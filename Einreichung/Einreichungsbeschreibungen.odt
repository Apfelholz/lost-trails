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d8ab" officeooo:paragraph-rsid="001fd8ab"/>
    </style:style>
    <style:style style:name="P2" style:family="paragraph" style:parent-style-name="Standard">
      <style:text-properties officeooo:rsid="001fd8ab" officeooo:paragraph-rsid="001fd8a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T1" style:family="text">
      <style:text-properties officeooo:rsid="001fd8a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itfragen:</text:p>
      <text:p text:style-name="P2">- Woher kam die Idee</text:p>
      <text:p text:style-name="P2">- Warum hast du dich dafür entschieden?</text:p>
      <text:p text:style-name="P2">- Was ging dir bei der Arbeit daran durch den Kopf?</text:p>
      <text:p text:style-name="P2"/>
      <text:p text:style-name="P2">Grafik:</text:p>
      <text:p text:style-name="P2">- Ursprüngliche Idee gezeichnete Karaktere meines Bruders zum leben zu erwecken</text:p>
      <text:p text:style-name="P2">- Alleinstellungsmerkmal durch eigenen Stiel im spiel – keine Perfektion nötig um ein imersieve Welt zu erschaffen</text:p>
      <text:p text:style-name="P2">- Zentralperspektive in der der Spieler sich 3*2D Bewegen kann um nicht auf reines 2D Gameplay beschränkt zu sein </text:p>
      <text:p text:style-name="P2"/>
      <text:p text:style-name="P2">Erzählung:</text:p>
      <text:p text:style-name="P2">- Aus der Grundidee meines Bruders einen Fuchs zu spielen an dem ein Experiment durchgeführt wird</text:p>
      <text:p text:style-name="P2">- Gemeinsam innerhalb von wenigen Minuten eine Geschichte erschaffen (Immens begünstigt dadurch das man sich als Brüder kennt und die Gedanken das anderen weiterführen kann)</text:p>
      <text:p text:style-name="P2">- Diese Geschichte kooperativ aufgeschrieben</text:p>
      <text:p text:style-name="P2">- Gemeinsam Gamemechaniken und Szeanen entwickelt mit dehnen sich sich erzählen lässt (Beispiel der Cutszens bei Zeitreise oder zu Beginn der ersten Szene.)</text:p>
      <text:p text:style-name="P2">- Von Anfang an das Ziel gesetzt eine immersive Welt zu schaffen in der man sich verlieren kann.</text:p>
      <text:p text:style-name="P2">- die Chanse der Zeitreisen im verlauf der Geschichte wollen wir innerhalb des Spiels für inttersante Retzel nutzen. Zum beispiel ein Zaun den man nur in einer frühreren Zeit durchquähren kann. Hierzu muss der spieler um die Story zu spielen nach und nach rausfinden wie er die unkotrolieren zeitreisen kontrolieren kann. Dies ist selbst wieder Ellement der Story, da die Funktionsweise dieser Mechanik eng mit der Story verbunden ist.</text:p>
      <text:p text:style-name="P2"/>
      <text:p text:style-name="P2">Prototypen-Video:</text:p>
      <text:p text:style-name="P2">- Bereits Vorerfahrung in Godot – deshalb offensichtliche Wahl zu Umsetzung</text:p>
      <text:p text:style-name="P2">- Web Export möglich und angedacht</text:p>
      <text:p text:style-name="P2">- Gedacht als klassisches PC/Browser Game, da heridurch bessere Imersion möglich ohne Steuzerellemente auf dem Bildschirm<text:line-break/>- Hud ellemente auf dem Bildschirm haben wir aktiv vermieden auch um die imersion zu fördern</text:p>
      <text:p text:style-name="P2">- Erster Prototyp enthält Start und End Screen mit Titelmusik, Logo so wie die ersten drei Szenen. ALLES NICHT FINAL</text:p>
      <text:p text:style-name="P2">- Start Screen stimmt mit mystischer Optik und tiefe erschaffendem Farbferlauf als Hintergrung mithilfe der Titelmusik auf die gesamte Stimmung des Spiels ein.</text:p>
      <text:p text:style-name="P2">- Die erste Szene ist eine Cuszene in welcher man in der ego Perspektive des Fuchses die Höhle in der dieser Aufwacht durch sein Höhle blinzeln sieht. (Hierbei ist Ego perspektivische Zeichnung der Höhle noch nicht fertig)</text:p>
      <text:p text:style-name="P2">- Die zweite Szenen ist die Höhle in der für das spiel typischen 3*2D Zentralperspektive. Der Fuchs kann hier nur auf der zweiten Ebene der Zentralperspektive an einer Säule vorbei um dann über alle drei ebenen ein kleines jump-and-run zu absolvieren und auf einer Hochebene aus der Höhle heraus zu laufen. Dies ist gleichermaßen der Beginn der Story und die Vorstellung des Bewegungssystems in dem der Spieler arbeiten muss.</text:p>
      <text:p text:style-name="P2">- Die Zweite Szene spielt in einem Wald, in dem sich der Spieler relativ frei bewegen kann. Die einzigen Hindernissen sind zwei Bäume auf unterschiedlichen Ebenen an dehnen aber wie gewohnt problemlos vorbei navigiert werden kann. Auch findet sich in der Szene eine Blitzende Autobatterie. Wenn der Spieler in deren nähe kommt geht das spiel mit der ersten Zeitreise weiter.</text:p>
      <text:p text:style-name="P2">In diesem Prototypen enthällt bis zu diesem Punkt alle Elemente des Spieles Beispielhaft, jedoch funktionstüchtig.</text:p>
      <text:p text:style-name="P2"><text:soft-page-break/>- Der Endscreen enthält wieder die Titelmusik und zeigt die weitere Story so wie die Credits unter Verwendung eines custom Fontschaders der an das Motiv der plitzenden elexiträt anknüpft.</text:p>
      <text:p text:style-name="P2">- Im ganzen spiel ist um es intuitiv verständlich zu machen Licht als ein Wegweiser verwendet worden.</text:p>
      <text:p text:style-name="P2"/>
      <text:h text:style-name="P1" text:outline-level="2"><text:span text:style-name="Strong_20_Emphasis">Grafik</text:span></text:h>
      <text:list text:style-name="L1">
        <text:list-item>
          <text:p text:style-name="P4">Ursprüngliche Idee: die gezeichneten Charaktere meines Bruders zum Leben zu erwecken. </text:p>
        </text:list-item>
        <text:list-item>
          <text:p text:style-name="P4">Alleinstellungsmerkmal durch einen eigenen Stil im Spiel – es ist keine Perfektion nötig, um eine immersive Welt zu erschaffen. </text:p>
        </text:list-item>
        <text:list-item>
          <text:p text:style-name="P3">Zentralperspektive, in der sich der Spieler in einer Art „3×2D“-Raum bewegen kann – also eine 2D-Darstellung mit mehreren Tiefenebenen, zwischen denen der Spieler wechseln kann, sodass das Gameplay nicht auf reines 2D beschränkt ist. </text:p>
        </text:list-item>
      </text:list>
      <text:h text:style-name="Heading_20_2" text:outline-level="2"><text:span text:style-name="Strong_20_Emphasis">Erzählung</text:span></text:h>
      <text:list text:style-name="L2">
        <text:list-item>
          <text:p text:style-name="P6">Ausgangspunkt war die Grundidee meines Bruders, einen Fuchs zu spielen, an dem ein Experiment durchgeführt wird. </text:p>
        </text:list-item>
        <text:list-item>
          <text:p text:style-name="P6">Gemeinsam haben wir innerhalb weniger Minuten eine Geschichte entwickelt (stark begünstigt dadurch, dass wir uns als Brüder gut kennen und die Gedanken des anderen weiterführen können). </text:p>
        </text:list-item>
        <text:list-item>
          <text:p text:style-name="P6">Diese Geschichte wurde anschließend kooperativ ausgearbeitet und aufgeschrieben. </text:p>
        </text:list-item>
        <text:list-item>
          <text:p text:style-name="P6">Wir haben gemeinsam Spielmechaniken und Szenen entwickelt, mit denen sich die Geschichte erzählen lässt (z. B. Cutscenes bei Zeitreisen oder zu Beginn der ersten Szene). </text:p>
        </text:list-item>
        <text:list-item>
          <text:p text:style-name="P6">Von Anfang an war es unser Ziel, eine immersive Welt zu erschaffen, in der man sich verlieren kann. </text:p>
        </text:list-item>
        <text:list-item>
          <text:p text:style-name="P5">Die Möglichkeit von Zeitreisen im Verlauf der Geschichte nutzen wir für interessante Rätsel. Zum Beispiel ein Zaun, den man nur in einer früheren Zeit durchqueren kann. Der Spieler muss im Verlauf der Story herausfinden, wie er die zunächst unkontrollierten Zeitreisen steuern kann. Diese Mechanik ist selbst Teil der Handlung und eng mit der Geschichte verknüpft. </text:p>
        </text:list-item>
      </text:list>
      <text:h text:style-name="Heading_20_2" text:outline-level="2"><text:span text:style-name="Strong_20_Emphasis">Prototypen-Video</text:span></text:h>
      <text:list text:style-name="L3">
        <text:list-item>
          <text:p text:style-name="P8">Bereits vorhandene Erfahrung mit der Godot-Engine, daher eine naheliegende Wahl für die Umsetzung. </text:p>
        </text:list-item>
        <text:list-item>
          <text:p text:style-name="P8">Ein Web-Export ist möglich und vorgesehen. </text:p>
        </text:list-item>
        <text:list-item>
          <text:p text:style-name="P8">Konzipiert als klassisches PC-/Browser-Spiel, da dadurch eine bessere Immersion ohne störende Steuerelemente auf dem Bildschirm erreicht wird. </text:p>
        </text:list-item>
        <text:list-item>
          <text:p text:style-name="P8">HUD-Elemente wurden bewusst vermieden, um die Immersion zu fördern. </text:p>
        </text:list-item>
        <text:list-item>
          <text:p text:style-name="P8">Der erste Prototyp enthält einen Start- und Endscreen mit Titelmusik und Logo sowie die ersten drei Szenen (alles noch in Entwicklung). </text:p>
        </text:list-item>
        <text:list-item>
          <text:p text:style-name="P8">Der Startscreen stimmt mit einer mystischen Optik und einem Tiefe erzeugenden Farbverlauf im Hintergrund, unterstützt durch die Titelmusik, auf die Atmosphäre des Spiels ein. </text:p>
        </text:list-item>
        <text:list-item>
          <text:p text:style-name="P8"><text:soft-page-break/>Die erste Szene ist eine Cutscene, in der man aus der Ego-Perspektive des Fuchses die Höhle sieht, in der er aufwacht (die perspektivische Darstellung ist noch nicht vollständig ausgearbeitet). </text:p>
        </text:list-item>
        <text:list-item>
          <text:p text:style-name="P8">Die zweite Szene zeigt die Höhle in der für das Spiel typischen 3×2D-Zentralperspektive. Der Fuchs bewegt sich hier zunächst <text:span text:style-name="T1">über zwei</text:span> Ebene, um eine Säule herum, und absolviert anschließend ein kleines Jump-and-Run-Element über mehrere Ebenen, um aus der Höhle zu gelangen. Dies dient sowohl als Einstieg in die Story als auch zur Einführung des Bewegungssystems. </text:p>
        </text:list-item>
        <text:list-item>
          <text:p text:style-name="P8">Die dritte Szene spielt in einem Wald, in dem sich der Spieler relativ frei bewegen kann. <text:span text:style-name="T1">Dort</text:span> findet sich eine blitzende Autobatterie: Nähert sich der Spieler, wird die erste Zeitreise ausgelöst. </text:p>
        </text:list-item>
        <text:list-item>
          <text:p text:style-name="P8">Der Prototyp enthält bis zu diesem Punkt bereits alle Spielelemente <text:span text:style-name="T1">der Szenen</text:span> exemplarisch und funktionsfähig. </text:p>
        </text:list-item>
        <text:list-item>
          <text:p text:style-name="P8">Der Endscreen enthält erneut die Titelmusik und zeigt <text:span text:style-name="T1">die</text:span> weitere Story sowie die Credits, unter Verwendung eines eigenen Font-Shaders, der das Motiv der blitzenden Elektrizität aufgreift. </text:p>
        </text:list-item>
        <text:list-item>
          <text:p text:style-name="P7">Im gesamten Spiel wird Licht als intuitiver Wegweiser eingesetzt.</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7T14:51:23.733000000</meta:creation-date>
    <meta:generator>LibreOffice/7.5.4.2$Windows_X86_64 LibreOffice_project/36ccfdc35048b057fd9854c757a8b67ec53977b6</meta:generator>
    <dc:date>2026-03-27T16:22:21.666000000</dc:date>
    <meta:editing-duration>PT1H30M58S</meta:editing-duration>
    <meta:editing-cycles>1</meta:editing-cycles>
    <meta:document-statistic meta:table-count="0" meta:image-count="0" meta:object-count="0" meta:page-count="3" meta:paragraph-count="51" meta:word-count="1036" meta:character-count="6785" meta:non-whitespace-character-count="5796"/>
  </office:meta>
</office:document-meta>
</file>