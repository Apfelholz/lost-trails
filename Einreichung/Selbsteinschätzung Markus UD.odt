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6096" officeooo:paragraph-rsid="00016096"/>
    </style:style>
    <style:style style:name="P2" style:family="paragraph" style:parent-style-name="Standard">
      <style:paragraph-properties fo:line-height="150%"/>
      <style:text-properties style:text-underline-style="none" fo:font-weight="normal" officeooo:rsid="0010668f" officeooo:paragraph-rsid="00016096" style:font-weight-asian="normal" style:font-weight-complex="normal"/>
    </style:style>
    <style:style style:name="P3" style:family="paragraph" style:parent-style-name="Standard">
      <style:paragraph-properties fo:line-height="150%"/>
      <style:text-properties style:text-underline-style="none" fo:font-weight="normal" officeooo:rsid="000debd0" officeooo:paragraph-rsid="00016096" style:font-weight-asian="normal" style:font-weight-complex="normal"/>
    </style:style>
    <style:style style:name="P4" style:family="paragraph" style:parent-style-name="Standard">
      <style:paragraph-properties fo:line-height="150%"/>
      <style:text-properties style:text-underline-style="none" fo:font-weight="normal" officeooo:rsid="000e56db" officeooo:paragraph-rsid="00016096" style:font-weight-asian="normal" style:font-weight-complex="normal"/>
    </style:style>
    <style:style style:name="P5" style:family="paragraph" style:parent-style-name="Standard">
      <style:paragraph-properties fo:line-height="150%"/>
      <style:text-properties style:text-underline-style="none" fo:font-weight="normal" officeooo:rsid="0003530d" officeooo:paragraph-rsid="0003530d" style:font-weight-asian="normal" style:font-weight-complex="normal"/>
    </style:style>
    <style:style style:name="P6" style:family="paragraph" style:parent-style-name="Standard">
      <style:paragraph-properties fo:line-height="150%"/>
      <style:text-properties style:text-underline-style="none" fo:font-weight="normal" officeooo:rsid="001244d9" officeooo:paragraph-rsid="0003530d" style:font-weight-asian="normal" style:font-weight-complex="normal"/>
    </style:style>
    <style:style style:name="P7" style:family="paragraph" style:parent-style-name="Standard">
      <style:paragraph-properties fo:line-height="150%"/>
      <style:text-properties style:text-underline-style="solid" style:text-underline-width="auto" style:text-underline-color="font-color" fo:font-weight="bold" officeooo:rsid="00095e66" officeooo:paragraph-rsid="00016096" style:font-weight-asian="bold" style:font-weight-complex="bold"/>
    </style:style>
    <style:style style:name="P8" style:family="paragraph" style:parent-style-name="Standard">
      <style:paragraph-properties fo:line-height="150%"/>
      <style:text-properties style:text-underline-style="solid" style:text-underline-width="auto" style:text-underline-color="font-color" fo:font-weight="bold" officeooo:rsid="000fc631" officeooo:paragraph-rsid="0001609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16096" officeooo:paragraph-rsid="00016096" style:font-weight-asian="bold" style:font-weight-complex="bold"/>
    </style:style>
    <style:style style:name="P10" style:family="paragraph" style:parent-style-name="Standard">
      <style:paragraph-properties fo:line-height="150%"/>
      <style:text-properties style:text-underline-style="solid" style:text-underline-width="auto" style:text-underline-color="font-color" fo:font-weight="bold" officeooo:rsid="0003530d" officeooo:paragraph-rsid="0003530d" style:font-weight-asian="bold" style:font-weight-complex="bold"/>
    </style:style>
    <style:style style:name="P11" style:family="paragraph" style:parent-style-name="Standard">
      <style:paragraph-properties fo:line-height="150%"/>
      <style:text-properties style:text-underline-style="none" fo:font-weight="normal" officeooo:rsid="0010668f" officeooo:paragraph-rsid="00016096" style:font-weight-asian="normal" style:font-weight-complex="normal"/>
    </style:style>
    <style:style style:name="P12" style:family="paragraph" style:parent-style-name="Standard">
      <style:paragraph-properties fo:line-height="150%"/>
      <style:text-properties style:text-underline-style="solid" style:text-underline-width="auto" style:text-underline-color="font-color" fo:font-weight="bold" officeooo:rsid="000fc631" officeooo:paragraph-rsid="00074654"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ad6d3" style:font-weight-asian="normal" style:font-weight-complex="normal"/>
    </style:style>
    <style:style style:name="T3" style:family="text">
      <style:text-properties style:text-underline-style="none" fo:font-weight="normal" officeooo:rsid="000debd0" style:font-weight-asian="normal" style:font-weight-complex="normal"/>
    </style:style>
    <style:style style:name="T4" style:family="text">
      <style:text-properties style:text-underline-style="none" fo:font-weight="normal" officeooo:rsid="000e56db" style:font-weight-asian="normal" style:font-weight-complex="normal"/>
    </style:style>
    <style:style style:name="T5" style:family="text">
      <style:text-properties style:text-underline-style="none" fo:font-weight="normal" officeooo:rsid="0012ed82" style:font-weight-asian="normal" style:font-weight-complex="normal"/>
    </style:style>
    <style:style style:name="T6" style:family="text">
      <style:text-properties style:text-underline-style="none" fo:font-weight="normal" officeooo:rsid="00159c4a" style:font-weight-asian="normal" style:font-weight-complex="normal"/>
    </style:style>
    <style:style style:name="T7" style:family="text">
      <style:text-properties style:text-underline-style="none" fo:font-weight="normal" officeooo:rsid="0010668f" style:font-weight-asian="normal" style:font-weight-complex="normal"/>
    </style:style>
    <style:style style:name="T8" style:family="text">
      <style:text-properties style:text-underline-style="none" fo:font-weight="normal" officeooo:rsid="00167f28" style:font-weight-asian="normal" style:font-weight-complex="normal"/>
    </style:style>
    <style:style style:name="T9" style:family="text">
      <style:text-properties style:text-underline-style="none" fo:font-weight="normal" fo:background-color="transparent" loext:char-shading-value="0" style:font-weight-asian="normal" style:font-weight-complex="normal"/>
    </style:style>
    <style:style style:name="T10" style:family="text">
      <style:text-properties officeooo:rsid="00167f28"/>
    </style:style>
    <style:style style:name="T11" style:family="text">
      <style:text-properties officeooo:rsid="0003530d"/>
    </style:style>
    <style:style style:name="T12" style:family="text">
      <style:text-properties officeooo:rsid="00151fad"/>
    </style:style>
    <style:style style:name="T13" style:family="text">
      <style:text-properties officeooo:rsid="00039120"/>
    </style:style>
    <style:style style:name="T14" style:family="text">
      <style:text-properties officeooo:rsid="0013e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rklärung:</text:p>
      <text:p text:style-name="P1"/>
      <text:p text:style-name="P7"><text:span text:style-name="T2">Ich habe mich dafür entschieden, </text:span><text:span text:style-name="T3">G</text:span><text:span text:style-name="T2">rafik </text:span><text:span text:style-name="T3">mit vier Punkten zu bewerten</text:span><text:span text:style-name="T2">, da ich </text:span><text:span text:style-name="T4">durch</text:span><text:span text:style-name="T2"> lange</text:span><text:span text:style-name="T4">s,</text:span><text:span text:style-name="T2"> </text:span><text:span text:style-name="T3">leidenschaftlich</text:span><text:span text:style-name="T4">es</text:span><text:span text:style-name="T3"> </text:span><text:span text:style-name="T4">Z</text:span><text:span text:style-name="T2">eichne</text:span><text:span text:style-name="T4">n</text:span><text:span text:style-name="T2"> </text:span><text:span text:style-name="T3">und</text:span><text:span text:style-name="T2"> </text:span><text:span text:style-name="T4">M</text:span><text:span text:style-name="T2">ale</text:span><text:span text:style-name="T4">n bereits relativ erfahren darin bin </text:span><text:span text:style-name="T5">und es mir wichtig ist</text:span><text:span text:style-name="T2">. </text:span><text:span text:style-name="T5">Der Ursprung des Spieles sind auch meine Skizzen des Fuchses. Der Gedanke, ihn dann in einem Spiel zum Leben zu erwecken, kam erst danach, weil er so eine nette Figur wurde, die einen zu Geschichten inspirierte. Beim Zeichnen</text:span><text:span text:style-name="T2"> sehe ich </text:span><text:span text:style-name="T5">aber auch </text:span><text:span text:style-name="T2">noch </text:span><text:span text:style-name="T3">v</text:span><text:span text:style-name="T2">iel</text:span><text:span text:style-name="T5">e Bereiche</text:span><text:span text:style-name="T2">, </text:span><text:span text:style-name="T3">in de</text:span><text:span text:style-name="T5">nen</text:span><text:span text:style-name="T2"> ich mich verbessern kann. </text:span><text:span text:style-name="T3">Als ich für </text:span><text:span text:style-name="T4">L</text:span><text:span text:style-name="T3">ost-</text:span><text:span text:style-name="T5">T</text:span><text:span text:style-name="T3">rails die Szenen gezeichnet habe, ist mir besonders aufgefallen, dass ich beim perspektivischen Zeichen noch viel lernen </text:span><text:span text:style-name="T4">möchte</text:span><text:span text:style-name="T3">. </text:span><text:span text:style-name="T5">Auch habe ich zum ersten Mal versucht, sich eine Figur bewegen zu lassen. </text:span><text:span text:style-name="T4">Dieser Wettbewerb ist für mich </text:span><text:span text:style-name="T5">daher</text:span><text:span text:style-name="T4"> eine Gelegenheit,</text:span><text:span text:style-name="T3"> mich an diese</text:span><text:span text:style-name="T5">n</text:span><text:span text:style-name="T3"> Stelle</text:span><text:span text:style-name="T5">n</text:span><text:span text:style-name="T3"> weiterzuentwickeln.</text:span></text:p>
      <text:p text:style-name="P3"/>
      <text:p text:style-name="P7"><text:span text:style-name="T4">Meine Bewertung im Bereiches des Sounds begründet sich darauf, dass ich nicht aktiv im Soundd</text:span><text:span text:style-name="T5">esign</text:span><text:span text:style-name="T4"> </text:span><text:span text:style-name="T5">i</text:span><text:span text:style-name="T4">nvolviert bin, jedoch bei den ursprünglichen Ideen meine Erfahrung eingebracht habe. Auch werde ich bei der geplanten Orchesteraufnahme an der Geige mitspielen.</text:span></text:p>
      <text:p text:style-name="P4"/>
      <text:p text:style-name="P4">Meine Bewertung im Bereich der Programmierung ist mir sehr leicht gefallen: Ich habe keine Zeile Code geschrieben und vertraue hierbei vollständig auf die Magie meines Bruders und Teamkameraden. </text:p>
      <text:p text:style-name="P4"/>
      <text:p text:style-name="P12"><text:span text:style-name="T1">Ich habe </text:span><text:span text:style-name="T5">schon</text:span><text:span text:style-name="T1"> immer gerne </text:span><text:span text:style-name="T5">meine Fantasie laufen lassen und mir </text:span><text:span text:style-name="T1">Welten und Geschichten ausgedacht, in denen meine Figuren u</text:span><text:span text:style-name="T5">m</text:span><text:span text:style-name="T1">herwandeln und </text:span><text:span text:style-name="T5">A</text:span><text:span text:style-name="T1">benteuer erleben. Seit ich gelernt habe zu schreiben, ha</text:span><text:span text:style-name="T5">be ich begonnen</text:span><text:span text:style-name="T1">, diese </text:span><text:span text:style-name="T5">Geschichten etwas auszuarbeiten und niederzuschreiben</text:span><text:span text:style-name="T1">. </text:span><text:span text:style-name="T5">So ist während meiner Grundschulzeit etwa eine Sammlung von Max-Geschichten entstanden, die Abenteuer unseres Klassentieres Max, eines ziemlich unternehmungslustigen Maulwurfes.</text:span><text:span text:style-name="T1"> In der Spielentwicklung </text:span><text:span text:style-name="T6">sehe ich eine Chance</text:span><text:span text:style-name="T1">, </text:span><text:span text:style-name="T6">solche</text:span><text:span text:style-name="T1"> Welten auch außerhalb meines Kopfes </text:span><text:span text:style-name="T6">mit <text:s/>neuen Möglichkeiten zu erschaffen</text:span><text:span text:style-name="T1">. Für Lost-Trails habe ich mir die Rahmenha</text:span><text:span text:style-name="T6">nd</text:span><text:span text:style-name="T1">lung ausgedacht und zusammen mit meinem </text:span><text:span text:style-name="T7">Bruder</text:span><text:span text:style-name="T1"> weiterentwickelt. Jedes </text:span><text:span text:style-name="T6">E</text:span><text:span text:style-name="T1">lement ist h</text:span><text:span text:style-name="T6">ie</text:span><text:span text:style-name="T1">rbei orginal, weshalb ich </text:span><text:span text:style-name="T9">mir 5 Punkte gegeben</text:span><text:span text:style-name="T1"> habe. </text:span></text:p>
      <text:p text:style-name="P12"><text:span text:style-name="T1">Das ent</text:span><text:span text:style-name="T8">wic</text:span><text:span text:style-name="T1">keln von eigenen Spielmechaniken habe ich bei diesem Projekt das erste mal kennengelernt </text:span><text:span text:style-name="T7">und für mich entdeckt</text:span><text:span text:style-name="T1">. Die Möglichkeit, eigene </text:span><text:span text:style-name="T8">A</text:span><text:span text:style-name="T1">rten der Spielerinteraktion zu schaffen, finde ich unfassbar interes</text:span><text:span text:style-name="T8">s</text:span><text:span text:style-name="T1">ant. </text:span><text:span text:style-name="T8">Mich fasziniert,</text:span><text:span text:style-name="T1"> wie die absurdesten Ideen „</text:span><text:span text:style-name="T8">R</text:span><text:span text:style-name="T1">e</text:span><text:span text:style-name="T8">a</text:span><text:span text:style-name="T1">l</text:span><text:span text:style-name="T8">it</text:span><text:span text:style-name="T1">ät“ werden können. Aus </text:span><text:span text:style-name="T8">der Freude daran sind bei der Entwicklung</text:span><text:span text:style-name="T1"> des </text:span><text:span text:style-name="T8">S</text:span><text:span text:style-name="T1">pieles bereits einige nette </text:span><text:span text:style-name="T8">M</text:span><text:span text:style-name="T1">echaniken entstanden, wie zum Beispiel das semi-unkontrollierte Zeitreisen, auf welchem die Story basiert. Daher die Bewertung. </text:span></text:p>
      <text:p text:style-name="P8"><text:soft-page-break/><text:span text:style-name="T1"><text:line-break/>In Organisation </text:span><text:span text:style-name="T7">habe ich mir 2 Punkte gegeben. Ich </text:span><text:span text:style-name="T8">habe wenig organisieren müssen und meinem Bruder vertraut, der mit der De</text:span><text:span text:style-name="T7">adline im Blick das Spiel vorangetrieben hat. Dies hat sich wunderbar ergänzt, da wir durch regelmäßige</text:span><text:span text:style-name="T8">n</text:span><text:span text:style-name="T7"> </text:span><text:span text:style-name="T8">Austausch über Ideen, Anforderungen und Arbeitsfortschritte</text:span><text:span text:style-name="T7"> relativ </text:span><text:span text:style-name="T8">s</text:span><text:span text:style-name="T7">tressfrei </text:span><text:span text:style-name="T8">voran gekommen</text:span><text:span text:style-name="T7"> sind.</text:span></text:p>
      <text:p text:style-name="P2"/>
      <text:p text:style-name="P2"><text:span text:style-name="T10">Meine</text:span> Teamfähi<text:span text:style-name="T10">g</text:span>keit habe ich mit 5 Punkten bewertet, <text:span text:style-name="T10">da ich hierin eine echte Stärke von mir sehe.</text:span> <text:span text:style-name="T10">Es gelingt mir gut, mit </text:span><text:span text:style-name="T11">A</text:span><text:span text:style-name="T10">nderen konzentriert gemeinsam zu arbeiten, geduldig mit ihren Eigenarten und Macken umzugehen und dabei nicht den Kopf zu verlieren. </text:span><text:span text:style-name="T11">In Gruppen entwickelt es sich irgendwie oft so, dass ich das Bindeglied zwischen den anderen Mitgliedern werde.</text:span></text:p>
      <text:p text:style-name="P2"/>
      <text:p text:style-name="P2"/>
      <text:p text:style-name="P10">In welchen Bereichen willst du dich weiterentwickeln?</text:p>
      <text:p text:style-name="P5"/>
      <text:p text:style-name="P6"><text:span text:style-name="T11">Ich interessiere </text:span>mich besonders für die <text:span text:style-name="T12">Geschichte </text:span><text:span text:style-name="T11">eines Spiels</text:span><text:span text:style-name="T12">, </text:span><text:span text:style-name="T11">die</text:span> <text:span text:style-name="T11">geeignete </text:span>Grafik, <text:span text:style-name="T11">um sie zu erzählen</text:span> und Spielmechanik<text:span text:style-name="T11">en</text:span>, <text:span text:style-name="T11">die etwas Überraschendes, die Fantasie Anregendes bieten können</text:span>. Ich habe mir schon immer <text:span text:style-name="T11">gerne </text:span><text:span text:style-name="T12">Welten, </text:span><text:span text:style-name="T11">Figuren</text:span> <text:span text:style-name="T11">und Geschichten </text:span>ausgedacht, <text:span text:style-name="T11">und </text:span>ich hoffe, diese einmal in Spielen zum <text:span text:style-name="T11">L</text:span>eben zu erwecken. Um dies zu erreichen m<text:span text:style-name="T11">öchte</text:span> ich besser darin werden, meine Gedanken und Ideen in eine Form zu bringen, welche auch für <text:span text:style-name="T11">Andere überzeugend und reizvoll ist</text:span>. <text:span text:style-name="T11">Für einen ersten Versuch hat es</text:span> bei der Entwicklung von <text:span text:style-name="T11">L</text:span>ost-<text:span text:style-name="T11">T</text:span>rails <text:span text:style-name="T11">gemeinsam</text:span> mit meinem Bruder bereits recht gut geklappt, jedoch hoffe ich noch besser im <text:span text:style-name="T11">E</text:span>rzählen <text:span text:style-name="T11">und Zeichnen </text:span>zu werden! Meine Zeichenleidenschaft hat sich als wertvolles Werkzeug erwiesen um diese Welten und Geschichten anderen zu zeigen. Besser darin zu werden, perspektivisch zu zeichnen <text:span text:style-name="T13">und Bewegungen zu animieren, um meine Ideen überzeugender darzustellen</text:span>, ist hierbei mein nächster Schritt. Lost-<text:span text:style-name="T13">T</text:span>rails ist auch eine Chance meinen Stil in verschiedenen Anwendungen weiterzuentwickeln und auszuprobieren. Hierbei nach und nach besser darin zu werden, meine Ideen abzubilden, dafür will ich arbeiten. <text:span text:style-name="T14">Auch will ich die in der Entwicklung neu entdeckte Leidenschaft für besondere und eigene Spielmechaniken weiter erforschen und </text:span><text:span text:style-name="T13">ausprobieren, was man damit alles machen kan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7T10:12:38.053000000</meta:creation-date>
    <dc:date>2026-03-27T13:26:32.361000000</dc:date>
    <meta:editing-duration>PT44M15S</meta:editing-duration>
    <meta:editing-cycles>4</meta:editing-cycles>
    <meta:generator>LibreOffice/7.2.7.2$Windows_X86_64 LibreOffice_project/8d71d29d553c0f7dcbfa38fbfda25ee34cce99a2</meta:generator>
    <meta:print-date>2026-03-27T10:47:36.260000000</meta:print-date>
    <meta:document-statistic meta:table-count="0" meta:image-count="0" meta:object-count="0" meta:page-count="2" meta:paragraph-count="10" meta:word-count="669" meta:character-count="4615" meta:non-whitespace-character-count="3951"/>
  </office:meta>
</office:document-meta>
</file>