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95e66" officeooo:paragraph-rsid="00095e66" style:font-weight-asian="bold" style:font-weight-complex="bold"/>
    </style:style>
    <style:style style:name="P2" style:family="paragraph" style:parent-style-name="Standard">
      <style:text-properties style:text-underline-style="solid" style:text-underline-width="auto" style:text-underline-color="font-color" fo:font-weight="bold" officeooo:rsid="00095e66" officeooo:paragraph-rsid="000debd0" style:font-weight-asian="bold" style:font-weight-complex="bold"/>
    </style:style>
    <style:style style:name="P3" style:family="paragraph" style:parent-style-name="Standard">
      <style:text-properties style:text-underline-style="solid" style:text-underline-width="auto" style:text-underline-color="font-color" fo:font-weight="bold" officeooo:rsid="000ad6d3" officeooo:paragraph-rsid="000ad6d3" style:font-weight-asian="bold" style:font-weight-complex="bold"/>
    </style:style>
    <style:style style:name="P4" style:family="paragraph" style:parent-style-name="Standard">
      <style:text-properties style:text-underline-style="solid" style:text-underline-width="auto" style:text-underline-color="font-color" fo:font-weight="bold" officeooo:rsid="000ad6d3" officeooo:paragraph-rsid="000debd0" style:font-weight-asian="bold" style:font-weight-complex="bold"/>
    </style:style>
    <style:style style:name="P5" style:family="paragraph" style:parent-style-name="Standard">
      <style:text-properties style:text-underline-style="solid" style:text-underline-width="auto" style:text-underline-color="font-color" fo:font-weight="bold" officeooo:rsid="000b06ee" officeooo:paragraph-rsid="000b06ee" style:font-weight-asian="bold" style:font-weight-complex="bold"/>
    </style:style>
    <style:style style:name="P6" style:family="paragraph" style:parent-style-name="Standard">
      <style:text-properties style:text-underline-style="solid" style:text-underline-width="auto" style:text-underline-color="font-color" fo:font-weight="bold" officeooo:rsid="000fc631" officeooo:paragraph-rsid="000fc631" style:font-weight-asian="bold" style:font-weight-complex="bold"/>
    </style:style>
    <style:style style:name="P7" style:family="paragraph" style:parent-style-name="Standard">
      <style:text-properties style:text-underline-style="none" fo:font-weight="normal" officeooo:rsid="000e56db" officeooo:paragraph-rsid="000e56db" style:font-weight-asian="normal" style:font-weight-complex="normal"/>
    </style:style>
    <style:style style:name="P8" style:family="paragraph" style:parent-style-name="Standard">
      <style:text-properties style:text-underline-style="none" fo:font-weight="normal" officeooo:rsid="0010668f" officeooo:paragraph-rsid="0010668f" style:font-weight-asian="normal" style:font-weight-complex="normal"/>
    </style:style>
    <style:style style:name="P9" style:family="paragraph" style:parent-style-name="Standard">
      <style:text-properties style:text-underline-style="none" fo:font-weight="normal" officeooo:rsid="000ad6d3" officeooo:paragraph-rsid="00095e66" style:font-weight-asian="normal" style:font-weight-complex="normal"/>
    </style:style>
    <style:style style:name="P10" style:family="paragraph" style:parent-style-name="Standard">
      <style:text-properties style:text-underline-style="none" fo:font-weight="normal" officeooo:rsid="000ad6d3" officeooo:paragraph-rsid="000ad6d3" style:font-weight-asian="normal" style:font-weight-complex="normal"/>
    </style:style>
    <style:style style:name="P11" style:family="paragraph" style:parent-style-name="Standard">
      <style:paragraph-properties fo:break-before="page"/>
      <style:text-properties style:text-underline-style="none" fo:font-weight="normal" officeooo:rsid="000ad6d3" officeooo:paragraph-rsid="000ad6d3" style:font-weight-asian="normal" style:font-weight-complex="normal"/>
    </style:style>
    <style:style style:name="P12" style:family="paragraph" style:parent-style-name="Standard">
      <style:text-properties style:text-underline-style="none" fo:font-weight="normal" officeooo:rsid="000ad6d3" officeooo:paragraph-rsid="000debd0" style:font-weight-asian="normal" style:font-weight-complex="normal"/>
    </style:style>
    <style:style style:name="P13" style:family="paragraph" style:parent-style-name="Standard">
      <style:text-properties style:text-underline-style="none" fo:font-weight="normal" officeooo:rsid="000b06ee" officeooo:paragraph-rsid="000ad6d3" style:font-weight-asian="normal" style:font-weight-complex="normal"/>
    </style:style>
    <style:style style:name="P14" style:family="paragraph" style:parent-style-name="Standard">
      <style:text-properties style:text-underline-style="none" fo:font-weight="normal" officeooo:rsid="000b06ee" officeooo:paragraph-rsid="000b06ee" style:font-weight-asian="normal" style:font-weight-complex="normal"/>
    </style:style>
    <style:style style:name="P15" style:family="paragraph" style:parent-style-name="Standard">
      <style:text-properties style:text-underline-style="none" fo:font-weight="normal" officeooo:rsid="000b06ee" officeooo:paragraph-rsid="000debd0" style:font-weight-asian="normal" style:font-weight-complex="normal"/>
    </style:style>
    <style:style style:name="P16" style:family="paragraph" style:parent-style-name="Standard">
      <style:text-properties style:text-underline-style="none" fo:font-weight="normal" officeooo:rsid="000c7da7" officeooo:paragraph-rsid="000b06ee" style:font-weight-asian="normal" style:font-weight-complex="normal"/>
    </style:style>
    <style:style style:name="P17" style:family="paragraph" style:parent-style-name="Standard">
      <style:text-properties style:text-underline-style="none" fo:font-weight="normal" officeooo:rsid="000c7da7" officeooo:paragraph-rsid="00095e66" style:font-weight-asian="normal" style:font-weight-complex="normal"/>
    </style:style>
    <style:style style:name="P18" style:family="paragraph" style:parent-style-name="Standard">
      <style:text-properties style:text-underline-style="none" fo:font-weight="normal" officeooo:rsid="000c7da7" officeooo:paragraph-rsid="000debd0" style:font-weight-asian="normal" style:font-weight-complex="normal"/>
    </style:style>
    <style:style style:name="P19" style:family="paragraph" style:parent-style-name="Standard">
      <style:text-properties style:text-underline-style="none" fo:font-weight="normal" officeooo:rsid="001244d9" officeooo:paragraph-rsid="001244d9" style:font-weight-asian="normal" style:font-weight-complex="normal"/>
    </style:style>
    <style:style style:name="P20" style:family="paragraph" style:parent-style-name="Standard">
      <style:text-properties style:text-underline-style="none" fo:font-weight="normal" officeooo:rsid="0013e397" officeooo:paragraph-rsid="0013e397" style:font-weight-asian="normal" style:font-weight-complex="normal"/>
    </style:style>
    <style:style style:name="P21" style:family="paragraph" style:parent-style-name="Standard">
      <style:text-properties officeooo:rsid="00095e66" officeooo:paragraph-rsid="000b06ee"/>
    </style:style>
    <style:style style:name="P22" style:family="paragraph" style:parent-style-name="Standard">
      <style:text-properties style:text-underline-style="solid" style:text-underline-width="auto" style:text-underline-color="font-color" officeooo:rsid="00151fad" officeooo:paragraph-rsid="00151fad"/>
    </style:style>
    <style:style style:name="T1" style:family="text">
      <style:text-properties fo:font-weight="normal" style:font-weight-asian="normal" style:font-weight-complex="normal"/>
    </style:style>
    <style:style style:name="T2" style:family="text">
      <style:text-properties fo:font-weight="normal" officeooo:rsid="000ad6d3" style:font-weight-asian="normal" style:font-weight-complex="normal"/>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officeooo:rsid="000ad6d3" style:font-weight-asian="normal" style:font-weight-complex="normal"/>
    </style:style>
    <style:style style:name="T5" style:family="text">
      <style:text-properties style:text-underline-style="none" fo:font-weight="normal" officeooo:rsid="000b06ee" style:font-weight-asian="normal" style:font-weight-complex="normal"/>
    </style:style>
    <style:style style:name="T6" style:family="text">
      <style:text-properties style:text-underline-style="none" fo:font-weight="normal" officeooo:rsid="000c7da7" style:font-weight-asian="normal" style:font-weight-complex="normal"/>
    </style:style>
    <style:style style:name="T7" style:family="text">
      <style:text-properties style:text-underline-style="none" fo:font-weight="normal" officeooo:rsid="000debd0" style:font-weight-asian="normal" style:font-weight-complex="normal"/>
    </style:style>
    <style:style style:name="T8" style:family="text">
      <style:text-properties style:text-underline-style="none" fo:font-weight="normal" officeooo:rsid="000e56db" style:font-weight-asian="normal" style:font-weight-complex="normal"/>
    </style:style>
    <style:style style:name="T9" style:family="text">
      <style:text-properties style:text-underline-style="none" fo:font-weight="normal" officeooo:rsid="0010668f" style:font-weight-asian="normal" style:font-weight-complex="normal"/>
    </style:style>
    <style:style style:name="T10" style:family="text">
      <style:text-properties style:text-underline-style="none" fo:font-weight="normal" officeooo:rsid="001244d9" style:font-weight-asian="normal" style:font-weight-complex="normal"/>
    </style:style>
    <style:style style:name="T11" style:family="text">
      <style:text-properties style:text-underline-style="none" fo:font-weight="normal" fo:background-color="transparent" loext:char-shading-value="0" style:font-weight-asian="normal" style:font-weight-complex="normal"/>
    </style:style>
    <style:style style:name="T12" style:family="text">
      <style:text-properties style:text-underline-style="solid" style:text-underline-width="auto" style:text-underline-color="font-color" officeooo:rsid="00151fad"/>
    </style:style>
    <style:style style:name="T13" style:family="text">
      <style:text-properties officeooo:rsid="001244d9"/>
    </style:style>
    <style:style style:name="T14" style:family="text">
      <style:text-properties officeooo:rsid="00151fa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span text:style-name="T2">Erklärung</text:span><text:span text:style-name="T1">:</text:span></text:p>
      <text:p text:style-name="P21"><text:span text:style-name="T4">Ich habe mich dafür entschieden </text:span><text:span text:style-name="T10">die </text:span><text:span text:style-name="T7">G</text:span><text:span text:style-name="T4">rafik </text:span><text:span text:style-name="T7">mit vier Punkten zu bewerten</text:span><text:span text:style-name="T4">, da ich </text:span><text:span text:style-name="T8">durch</text:span><text:span text:style-name="T4"> lange</text:span><text:span text:style-name="T8">s</text:span><text:span text:style-name="T4"> </text:span><text:span text:style-name="T7">leidenschaftlich</text:span><text:span text:style-name="T8">es</text:span><text:span text:style-name="T7"> </text:span><text:span text:style-name="T8">Z</text:span><text:span text:style-name="T4">eichne</text:span><text:span text:style-name="T8">n</text:span><text:span text:style-name="T4"> </text:span><text:span text:style-name="T7">und</text:span><text:span text:style-name="T4"> </text:span><text:span text:style-name="T8">M</text:span><text:span text:style-name="T4">ahle</text:span><text:span text:style-name="T8">n bereits relativ erfahren darin bin</text:span><text:span text:style-name="T4">. </text:span><text:span text:style-name="T10">Beim zeichnen der</text:span><text:span text:style-name="T7"> Szenen </text:span><text:span text:style-name="T10">für lost-trails </text:span><text:span text:style-name="T7">ist mir besonders aufgefallen, dass ich beim perspektivischen Zeichen noch viel lernen </text:span><text:span text:style-name="T8">möchte</text:span><text:span text:style-name="T7">. </text:span><text:span text:style-name="T8">Dieser Wettbewerb ist für mich auch eine Gelegenheit</text:span><text:span text:style-name="T7"> mich an dieser Stelle weiterzuentwickeln. </text:span><text:span text:style-name="T8">Meine Bewertung im Bereiches des Sounds begründet sich darauf, dass ich nicht aktiv im Sounddisain Involviert bin, jedoch bei den ursprünglichen Ideen meine Erfahrung eingebracht habe. Auch werde ich bei der geplanten Orchesteraufnahme an der Geige mitspielen.</text:span></text:p>
      <text:p text:style-name="P7">Meine Bewertung im Bereich der Programmierung ist mir sehr leicht gefallen: Ich habe keine Zeile Code geschrieben und vertraue hierbei vollständig auf die Magie meines Bruders und Teamkameraden. </text:p>
      <text:p text:style-name="P6"><text:span text:style-name="T3">Ich habe mir schon immer gerne Welten und Geschichten ausgedacht in dehnen meine Figuren </text:span><text:span text:style-name="T10">wandeln</text:span><text:span text:style-name="T3"> und Abenteuer erleben. Seit ich gelernt habe zu schreiben hat sich auch mein Interesse entwickelt diese Gedankenspiele nieder zufassen. In der Spielentwicklung habe ich eine Möglichkeit gefunden diese Welten auch außerhalb meines Kopfes zum leben zu erwecken. Für </text:span><text:span text:style-name="T10">l</text:span><text:span text:style-name="T3">ost -</text:span><text:span text:style-name="T10">t</text:span><text:span text:style-name="T3">rails habe ich mir die Rahmenhandlung ausgedacht und zusammen mit meinem </text:span><text:span text:style-name="T9">Bruder</text:span><text:span text:style-name="T3"> weiterentwickelt. Jedes </text:span><text:span text:style-name="T10">Element</text:span><text:span text:style-name="T3"> ist hierbei original, weshalb ich </text:span><text:span text:style-name="T11">mir 5 Punkte gegeben</text:span><text:span text:style-name="T3"> habe. </text:span></text:p>
      <text:p text:style-name="P6"><text:span text:style-name="T3">Das ent</text:span><text:span text:style-name="T10">w</text:span><text:span text:style-name="T3">i</text:span><text:span text:style-name="T10">c</text:span><text:span text:style-name="T3">keln von eigenen Spielmechaniken habe ich bei diesem Projekt das erste mal kennengelernt </text:span><text:span text:style-name="T9">und für mich entdeckt</text:span><text:span text:style-name="T3">. Die Möglichkeit eigene </text:span><text:span text:style-name="T10">A</text:span><text:span text:style-name="T3">rten der Spieler</text:span><text:span text:style-name="T10">i</text:span><text:span text:style-name="T3">nteraktion zu schaffen finde ich unfassbar interessant. </text:span><text:span text:style-name="T10">Hierbei fasziniert mich</text:span><text:span text:style-name="T3"> besonders wie </text:span><text:span text:style-name="T10">selbst die absurdesten und übernatürlichseten</text:span><text:span text:style-name="T3"> Ideen „relaität“ werden können. Aus diesem Intressen sind in der </text:span><text:span text:style-name="T10">E</text:span><text:span text:style-name="T3">n</text:span><text:span text:style-name="T10">tw</text:span><text:span text:style-name="T3">i</text:span><text:span text:style-name="T10">c</text:span><text:span text:style-name="T3">klung des </text:span><text:span text:style-name="T10">S</text:span><text:span text:style-name="T3">pieles bereits einige nette Mechaniken entstanden, wie zum Beispiel das semi unkontrollierte Zeitreisen auf welchem die Story basiert. Daher die Bewertung. <text:line-break/>In Organisation </text:span><text:span text:style-name="T9">habe ich mir 2 Punkte gegeben. Ich konnte mich hierbei auf meinen Bruder </text:span><text:span text:style-name="T10">v</text:span><text:span text:style-name="T9">erlassen der, immer die Deadline im Blick, </text:span><text:span text:style-name="T10">die Arbeit koordiniert hat</text:span><text:span text:style-name="T9">. Dies hat sich wunderbar </text:span><text:span text:style-name="T10">mit mir</text:span><text:span text:style-name="T9"> ergänzt, da wir durch regelmäßige Kommunikation über </text:span><text:span text:style-name="T10">den A</text:span><text:span text:style-name="T9">rbeistvortschrit relativ Stressfrei fertig geworden sind.</text:span></text:p>
      <text:p text:style-name="P8">Die Teamfähigkeit habe ich mit 5 Punkten bewertet. Es hat sich hierbei als cheatcode erwiesen mit meinem Bruder zusammenzuarbeiten. Was aber auch nicht funktionieren könnte wenn ich nicht im allgemeinen sehr gut darin wäre mit anderen <text:span text:style-name="T13">zu arbeiten</text:span> ohne jemals den Kopf zu verlieren.</text:p>
      <text:p text:style-name="P8"><text:line-break/><text:span text:style-name="T12">In welchen Bereichen willst du dich weiterentwickeln?</text:span><text:span text:style-name="T14">:</text:span></text:p>
      <text:p text:style-name="P19">Wie in der Erklärung meiner Wertung bereits angerissen interessiertere ich mich besonders für die <text:span text:style-name="T14">Geschichte</text:span> so wie Grafik und Spielmechanik, in welchen ich diese am liebsten ausdrücke. Ich habe mir schon immer <text:span text:style-name="T14">Welten</text:span> ausgedacht, ich hoffe diese einmal in Spielen zum leben zu erwecken. Um dies zu erreichen muss ich besser darin werden meine Gedanken und Ideen in eine Form zu bringen welche auch für andere Sinn ergibt. Dies hat bei der Entwickelung von lost-trails in der Zusammenarbeit mit meinem Bruder bereits recht gut geklappt, jedoch hoffe ich noch besser im erzählen zu werden!</text:p>
      <text:p text:style-name="P19">Meine Zeichenleidenschaft hat sich als wertvolles Werkzeug erwiesen um diese Welten und Geschichten anderen zu zeigen. Besser darin zu werden perspektivisch zu zeichnen um zu ermöglichen noch einfacher in diese Welten einzutauchen ist hierbei mein nächster Schritt. Lost-trails ist auch eine Chance meinen Stiel in verschiedenen Anwendungen weiterzuentwickeln und auszuprobieren. Hierbei nach und nach besser darin zu werden meine Ideen abzubilden, dafür will ich arbeiten.</text:p>
      <text:p text:style-name="P20">Auch will ich die in der Entwicklung neu entdeckte Leidenschaft für besondere und eigene Spielmechaniken weiter erforschen und raus finden was alles möglich ist!</text:p>
      <text:p text:style-name="P9"/>
      <text:p text:style-name="P10"/>
      <text:p text:style-name="P10"/>
      <text:p text:style-name="P10"/>
      <text:p text:style-name="P11">Ich habe sound nicht sonderlich hoch gestelt, weil ic nich sonder lich im sound desing des spiels involvirt war. Trotdem hatte ich ein par ideen wie die musik klingen solte und habe diese auch geäusert.</text:p>
      <text:p text:style-name="P10"/>
      <text:p text:style-name="P10">Programieren:Lass es uns kutz fassen. Ich kann nicht programiren!</text:p>
      <text:p text:style-name="P10"/>
      <text:p text:style-name="P3"><text:span text:style-name="T3">Erzählung:</text:span><text:span text:style-name="T5">Ich schreibe gerne und denke mir geschichten und welten aus in denen mein figuren umherwandern und abenteuer erleben. Für diesen spiel habe ich mir die grobe ramenhandlung ausgedacht, die dan ich und die anderen aus meinem team weiter gestaltet haben.</text:span></text:p>
      <text:p text:style-name="P13"/>
      <text:p text:style-name="P14">Spielmechanik:“Spielmechaniken endwikeln“ das ist ein punkt an dem ich erst in letzter zeit mit diesem projekt interesse gewonnen habe. Trotzdem denke ich habe icch mir ein par nette mechaniken ausgedacht wie z.b. das unkontrolirte zeit reisen , das du über die zeit lernen wirst zu kontroliren und auszunutzen um im spiel vorran zu schreiten.</text:p>
      <text:p text:style-name="P14"/>
      <text:p text:style-name="P14">Organisation:</text:p>
      <text:p text:style-name="P14"/>
      <text:p text:style-name="P5"><text:span text:style-name="T3">Teamfäichkeit:</text:span><text:span text:style-name="T6">ich kann mit vielen menschen zusammen arbeiten </text:span></text:p>
      <text:p text:style-name="P16"/>
      <text:p text:style-name="P16"/>
      <text:p text:style-name="P1">Text 2:<text:span text:style-name="T3">ich </text:span><text:span text:style-name="T6">möchte mich besonders in den bereichen grafik desing und und Erzählung weiter entwikeln, da mir diese besonders spas machen und ich viel freizeit mit ihnen verbringe und ich trotzdem denke das ich mich noch viel verbessern kann. Zudem </text:span></text:p>
      <text:p text:style-name="P17"/>
      <text:p text:style-name="P17"/>
      <text:p text:style-name="P2">Text 1:</text:p>
      <text:p text:style-name="P12">Grafik:Ich habe mich dafür endschiden grafik so hoch aber trotzdem nicht auf die höchste stufe, da ich schon seit langem gerne zeichne, mahle und dies auch regelmäsig tue. Dennoch sehe ich noch fiel raum nach oben, wie ich mich verbessern kann.</text:p>
      <text:p text:style-name="P12"/>
      <text:p text:style-name="P12">Sound:Ich habe sound nicht sonder lich hoch gestelt, weil ic nich sonder lich im sound desing des spiels involvirt war. Trotdem hatte ich ein par ideen wie die musik klingen solte und habe diese auch geäusert.</text:p>
      <text:p text:style-name="P12"/>
      <text:p text:style-name="P12">Programieren:Lass es uns kutz fassen. Ich kann nicht programiren!</text:p>
      <text:p text:style-name="P12"/>
      <text:p text:style-name="P4"><text:span text:style-name="T3">Erzählung:</text:span><text:span text:style-name="T5">Ich schreibe gerne und denke mir geschichten und welten aus in denen mein figuren umherwandern und abenteuer erleben. Für diesen spiel habe ich mir die grobe ramenhandlung ausgedacht, die dan ich und die anderen aus meinem team weiter gestaltet haben.</text:span></text:p>
      <text:p text:style-name="P15"/>
      <text:p text:style-name="P15">Spielmechanik:“Spielmechaniken endwikeln“ das ist ein punkt an dem ich erst in letzter zeit mit diesem projekt interesse gewonnen habe. Trotzdem denke ich habe icch mir ein par nette mechaniken ausgedacht wie z.b. das unkontrolirte zeit reisen , das du über die zeit lernen wirst zu kontroliren und auszunutzen um im spiel vorran zu schreiten.</text:p>
      <text:p text:style-name="P15"/>
      <text:p text:style-name="P15">Organisation:</text:p>
      <text:p text:style-name="P15"/>
      <text:p text:style-name="P18">Teamfäichkeit:ich kann mit vielen menschen zusammen arbeite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3-26T20:08:09.537000000</meta:creation-date>
    <dc:date>2026-03-26T22:50:35.651000000</dc:date>
    <meta:editing-duration>PT59M33S</meta:editing-duration>
    <meta:editing-cycles>4</meta:editing-cycles>
    <meta:generator>LibreOffice/7.5.4.2$Windows_X86_64 LibreOffice_project/36ccfdc35048b057fd9854c757a8b67ec53977b6</meta:generator>
    <meta:document-statistic meta:table-count="0" meta:image-count="0" meta:object-count="0" meta:page-count="2" meta:paragraph-count="25" meta:word-count="931" meta:character-count="6205" meta:non-whitespace-character-count="5293"/>
  </office:meta>
</office:document-meta>
</file>