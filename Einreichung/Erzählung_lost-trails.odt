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gg sans" svg:font-family="'gg sans', 'Noto Sans', 'Helvetica Neue', Helvetica, Arial, sans-serif"/>
  </office:font-face-decls>
  <office:automatic-styles>
    <style:style style:name="P1" style:family="paragraph" style:parent-style-name="Text_20_body">
      <style:paragraph-properties fo:margin-left="0cm" fo:margin-right="0cm" fo:text-align="start" style:justify-single-word="false" fo:orphans="2" fo:widows="2" fo:text-indent="0cm" style:auto-text-indent="false"/>
      <style:text-properties style:font-name="Liberation Serif" officeooo:rsid="001597c9" officeooo:paragraph-rsid="001597c9"/>
    </style:style>
    <style:style style:name="P2" style:family="paragraph" style:parent-style-name="Standard">
      <style:paragraph-properties fo:margin-left="0cm" fo:margin-right="0cm" fo:text-align="start" style:justify-single-word="false" fo:orphans="2" fo:widows="2" fo:text-indent="0cm" style:auto-text-indent="false"/>
      <style:text-properties style:font-name="Liberation Serif"/>
    </style:style>
    <style:style style:name="P3" style:family="paragraph" style:parent-style-name="Standard">
      <style:paragraph-properties fo:margin-left="0cm" fo:margin-right="0cm" fo:text-align="start" style:justify-single-word="false" fo:orphans="2" fo:widows="2" fo:text-indent="0cm" style:auto-text-indent="false"/>
      <style:text-properties style:font-name="Liberation Serif" officeooo:paragraph-rsid="001597c9"/>
    </style:style>
    <style:style style:name="P4" style:family="paragraph" style:parent-style-name="Standard">
      <style:paragraph-properties fo:margin-left="0cm" fo:margin-right="0cm" fo:text-align="start" style:justify-single-word="false" fo:orphans="2" fo:widows="2" fo:text-indent="0cm" style:auto-text-indent="false"/>
      <style:text-properties style:font-name="Liberation Serif" officeooo:rsid="001597c9" officeooo:paragraph-rsid="001597c9"/>
    </style:style>
    <style:style style:name="T1" style:family="text">
      <style:text-properties fo:font-variant="normal" fo:text-transform="none" fo:font-size="12pt" fo:letter-spacing="normal" fo:font-style="normal" fo:font-weight="normal"/>
    </style:style>
    <style:style style:name="T2" style:family="text">
      <style:text-properties fo:font-variant="normal" fo:text-transform="none" fo:font-size="12pt" fo:letter-spacing="normal" fo:font-style="normal" fo:font-weight="normal" officeooo:rsid="001597c9"/>
    </style:style>
    <style:style style:name="T3" style:family="text">
      <style:text-properties fo:font-variant="normal" fo:text-transform="none" fo:font-size="12pt" fo:letter-spacing="normal" fo:font-weight="normal"/>
    </style:style>
    <style:style style:name="T4" style:family="text">
      <style:text-properties officeooo:rsid="001597c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In </text:span><text:span text:style-name="Emphasis"><text:span text:style-name="T3">Lost Trails</text:span></text:span><text:span text:style-name="T1"> übernimmt man die Rolle eines Fuchses, der ohne Erinnerungen in einer Höhle aufwacht. Auf seiner Reise durch Zeit und Raum versucht er herauszufinden, wer oder was er eigentlich ist – denn schnell wird klar, dass er kein gewöhnliches Tier ist.</text:span></text:p>
      <text:p text:style-name="Text_20_body">Hintergrund dieser Geschichte ist eine Firma, die an einer Technologie zur Zeitreise forscht. Mithilfe implantierter Chips sollen Lebewesen in der Lage sein, zwischen verschiedenen Zeitpunkten zu wechseln. Nachdem ein Naturschutzverband erfolgreich gegen diese Experimente geklagt hatte, wurde der Firma offiziell verboten, die Technologie an Tieren zu testen. Dennoch wurden im Geheimen bereits erste Versuche durchgeführt: Mehreren Füchsen wurden Prototypen dieser Chips implantiert.</text:p>
      <text:p text:style-name="Text_20_body">Als die zuständige Behörde die Anlagen der Firma kontrollierte, fand sie nur noch leere Käfige vor. Die Tiere waren zuvor von den Pflegern freigelassen worden, um zu verhindern, dass die Experimente entdeckt werden. Der Fuchs, den man im Spiel steuert, ist eines dieser Tiere.</text:p>
      <text:p text:style-name="Text_20_body">Die Geschichte entfaltet sich nicht linear, sondern wird nach und nach durch das Erkunden der Welt und durch Erinnerungsfragmente erschlossen. Der implantierte Chip reagiert unkontrolliert auf elektrische Spannungsfelder. Nähert sich der Fuchs einer solchen Quelle, verliert er das Bewusstsein. In diesen Momenten erlebt der Spieler bruchstückhafte Rückblicke aus dem Leben des Fuchses, die im Verlauf des Spiels immer klarer werden.</text:p>
      <text:p text:style-name="Text_20_body">Nach jeder dieser Ohnmachten findet sich der Fuchs am selben Ort wieder – jedoch zu einem anderen Zeitpunkt. Die Umgebung verändert sich dabei drastisch und zeigt unterschiedliche Zustände derselben Welt. Diese Wechsel zwischen Zeiten sind nicht nur erzählerisches Mittel, sondern auch zentraler Bestandteil des Gameplays: Der Spieler muss die Veränderungen der Umwelt nutzen, um Hindernisse zu überwinden und neue Wege zu erschließen.</text:p>
      <text:p text:style-name="Text_20_body">Zu Beginn des Spiels erwacht der Fuchs in einer Höhle in einem Wald. Als er an die Oberfläche gelangt und eine alte, verrostete Autobatterie berührt, wird ihm schwarz vor Augen. In einer kurzen Vision sieht er sich selbst in einer sterilen Umgebung – einem Operationsraum, in dem an ihm experimentiert wird.</text:p>
      <text:p text:style-name="Text_20_body">Als er wieder zu sich kommt, befindet er sich am selben Ort, doch die Welt hat sich verändert: Der Wald ist verbrannt, der Boden von Asche bedeckt, und nur noch verkohlte Baumstämme ragen in den Himmel.</text:p>
      <text:p text:style-name="Text_20_body">Nachdem der Fuchs eine gewisse Strecke zurückgelegt hat, verändert sich die Umgebung erneut. <text:s/>Pflanzen <text:span text:style-name="T4">und Bäume sind nicht mehr nur verkohlt</text:span>, doch der Wald wirkt unnatürlich geordnet. Die Bäume stehen in geraden Reihen und sind durch ein System aus Schläuchen miteinander verbunden, das den Boden kontinuierlich bewässert. Leben scheint hier nur noch in kontrollierter Form zu existieren.</text:p>
      <text:p text:style-name="Text_20_body">Schließlich stößt der Fuchs auf ein kleines, abgeschiedenes Gebäude aus Beton. Aus seinem Inneren dringen mechanische Geräusche nach außen. Durch eine Öffnung gelangt der Fuchs hinein. Im schwachen, bläulichen Licht <text:span text:style-name="T4">eines blitzenden Kabels</text:span> erkennt er eine Maschine. Als er sich ihr nähert, verstummt sie plötzlich. <text:span text:style-name="T4">Als er einen Schalter mit der Schnauze anstupst springt sie an und ihm wird plötzlich schwarz vor Augen.</text:span></text:p>
      <text:p text:style-name="Text_20_body">Diese Fragmente bilden nach und nach ein Gesamtbild, das der Spieler selbst zusammensetzen muss. Die Geschichte von <text:span text:style-name="Emphasis">Lost Trails</text:span> entsteht so nicht nur durch das Erzählen, sondern vor allem durch das Erleben und Entdecken der Welt.</text:p>
      <text:p text:style-name="P4"><text:soft-page-break/><text:span text:style-name="T1"/></text:p>
      <text:p text:style-name="P4"><text:span text:style-name="T1"/></text:p>
      <text:p text:style-name="P4"><text:span text:style-name="T1">In lost-trails spielt man einen Fuchs welcher in einer Höhle aufwacht und auf seiner Reise durch Zeit und Raum versucht rauszufinden was er ist. </text:span></text:p>
      <text:p text:style-name="P4"><text:span text:style-name="T1">Denn er ist kein normaler Fuchs. Eine Firma forscht seid einiger Zeit an Chips die im Gehirn implantiert werden und dem Träger das Zeitreisen ermöglichen. Nachdem sie gegen eine Klage eines Naturschutzverbunden verloren hatte wurde ihr verboten damit zu beginnen diese Technologie an Tieren zu testen. Jedoch hatten sie im geheimen bereits damit begonnen Füchsen die ersten Exemplare zu implantieren. Als die Überwachungsbehörde die Anlagen der Firma nach dem verlohrenden Prozess stürmten um zu kontrollieren das diese sich an das verhängte verbot hielt fanden sie nur noch lehre Käfige vor. Die Tiere die hier gehalten worden waren, und an dehnen im geheimen bereits experimentiert worden war hatten die Pfleger freigelassen um zu verhindern das die Behörde diese fand. Der gespielte Fuchs ist eines dieser Tiere.</text:span></text:p>
      <text:p text:style-name="P4"><text:span text:style-name="T1">Die gespielte Story dreht sich darum diese Geschichte und deren Konsequenzen nach und nach zu entschlüsseln. Hierbei wird die Welt nicht innerhalb einer Zeitlienie erkundet. Der Chip im Gehirn des Fuchses reagiert unkontroliert auf spannungsfelder, was dazu führt, dass der Fuchs ohnmächtig wird, sobald er sich diesen nährt. In diesen Ohnmachtsequnezen sieht der Spieler sequenzen aus dem Leben des Fuchses, welche im verlauf des spieles immer deutlicher werden. Diese helfen ihm Rätsel zu lösen und am Ende die Geschichte zusammenzusetzen. Nach jeder dieser Ohnmachten wacht der Fuchs in einer anderen Zeit wieder auf, jedoch immer am selben Ort.</text:span></text:p>
      <text:p text:style-name="P3"><text:span text:style-name="T2">Zu beginn des Spieles wacht der Fuchs</text:span><text:span text:style-name="T1"> in einer Höhle in einem Wald auf. </text:span><text:span text:style-name="T2">Als er</text:span><text:span text:style-name="T1"> an die Oberfläche gelangt und ein alte verdreckte und verrostete Auto Batterie berührt wird ihm schwartz vor Augen und er kriegt einen falsch back zu einer Szene in einem Op raum als er wieder auf wacht liegt er an der selben Stelle wie vor her doch der Walt hat sich stark verändert alle Bäume sind nur noch verkohlte aus dem Boden ragende Stämme der Boden ist bedeckt von rus und Asche. Der Fuchs steht auf und erkundet die Umgebung doch er freundet weiter nur verbrannte hotz nach einiger Zeit verändert sich die Umgebung es sprießt wieder Gras und es gibt wieder lebende Bäume doch sie stehen nicht unregelmäßig wie im Wald vorhin sondern in Graden Reihen sie alle sicd verbunden mit Schläuchen durch die andauernd Wasser fliest und den Boden befeuchtet gibt sonst nichts lebendes hier nur Bäume und noch mehr Bäume nach einiger Zeit kommt der Fuchs an eine kleine Hütte, die aus Beton gebaut ist und nur kleine Fenster hat in denen sich Milchglas befindet. Aus dem inneren kommt ein Geräusch ein rattern und knattern der Fuchs untersucht das Gebäude und findet ein kleines Loch in der Wand im inneren ist es fast dunkel es gibt nur ein schwaches blaues glimmen in einer Ecke es geht von einem Draht aus der an einer einer machine angeschlossen ist diese ist es auch, die den Lärm macht als er auf sie zu geht verstummt sie.</text:span></text:p>
      <text:p text:style-name="P4"><text:span text:style-name="T1"/></text:p>
      <text:p text:style-name="P2"><text:span text:style-name="T2"/></text:p>
      <text:p text:style-name="P2"><text:span text:style-name="T2">E</text:span><text:span text:style-name="T1">ine Firma forscht an Gehirn Chips und anderen technologieen sie hat vor einiger Zeit einen neuen Chip vorgestellt ,den sie aber wegen einer Klage und einem verlorenen Gerichts Prozess gegen einen Natur Schutz Verbant aber nicht an Tieren testen Konten. Im geheimen testet sie die Chips aber schon lange in einem abgelegenen Labor an Füchse. Bei einem der neueren Modelle des Chips hat das Test Exemplar nach der Operation gute Ergebnisse aufgewiesen. Drei Tage nach der Operation als ein Pfleger und ein Tier Arzt zum Fuchs kamen war dieser verschwunden. Fuchs:der Fuchs wacht in einer Höhle in einem Wald auf er als an die Oberfläche gelangt und ein alte verdreckte und verrostete Auto Batterie berührt wird ihm schwartz vor Augen und er kriegt einen falsch back zu einer Szene in einem Op raum als er wieder auf wacht liegt er an der selben Stelle wie vor her doch der Walt hat sich stark verändert alle Bäume sind nur noch verkohlte aus dem Boden ragende Stämme der Boden ist bedeckt von rus und Asche. Der Fuchs steht auf und erkundet die Umgebung doch er freundet weiter nur verbrannte hotz nach einiger Zeit verändert sich die Umgebung es sprießt wieder Gras und es gibt wieder lebende Bäume doch sie stehen nicht unregelmäßig wie im Wald vorhin sondern in Graden Reihen sie alle sicd verbunden mit Schläuchen durch die andauernd Wasser fliest und den Boden befeuchtet gibt sonst nichts lebendes </text:span><text:soft-page-break/><text:span text:style-name="T1">hier nur Bäume und noch mehr Bäume nach einiger Zeit kommt der Fuchs an eine kleine Hütte, die aus Beton gebaut ist und nur kleine Fenster hat in denen sich Milchglas befindet. Aus dem inneren kommt ein Geräusch ein rattern und knattern der Fuchs untersucht das Gebäude und findet ein kleines Loch in der Wand im inneren ist es fast dunkel es gibt nur ein schwaches blaues glimmen in einer Ecke es geht von einem Draht aus der an einer einer machine angeschlossen ist diese ist es auch, die den Lärm macht als er auf sie zu geht verstummt sie</text:span>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gg sans" svg:font-family="'gg sans', 'Noto Sans',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3-27T16:58:15.615000000</meta:creation-date>
    <meta:generator>LibreOffice/7.5.4.2$Windows_X86_64 LibreOffice_project/36ccfdc35048b057fd9854c757a8b67ec53977b6</meta:generator>
    <dc:date>2026-03-27T17:43:07.358000000</dc:date>
    <meta:editing-duration>PT44M51S</meta:editing-duration>
    <meta:editing-cycles>1</meta:editing-cycles>
    <meta:document-statistic meta:table-count="0" meta:image-count="0" meta:object-count="0" meta:page-count="3" meta:paragraph-count="15" meta:word-count="1346" meta:character-count="8394" meta:non-whitespace-character-count="7057"/>
  </office:meta>
</office:document-meta>
</file>